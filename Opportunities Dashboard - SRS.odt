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2pt" style:font-size-asian="12pt" style:font-size-complex="12pt" fo:language="en" fo:country="US"/>
    </style:style>
    <style:style style:name="P2" style:parent-style-name="Normal" style:family="paragraph">
      <style:paragraph-properties fo:text-align="center"/>
      <style:text-properties fo:font-size="12pt" style:font-size-asian="12pt" style:font-size-complex="12pt" fo:language="en" fo:country="US"/>
    </style:style>
    <style:style style:name="P3" style:parent-style-name="Normal" style:family="paragraph">
      <style:paragraph-properties fo:text-align="center"/>
      <style:text-properties fo:font-size="12pt" style:font-size-asian="12pt" style:font-size-complex="12pt" fo:language="en" fo:country="US"/>
    </style:style>
    <style:style style:name="P4" style:parent-style-name="Normal" style:family="paragraph">
      <style:paragraph-properties fo:text-align="center"/>
    </style:style>
    <style:style style:name="T5" style:parent-style-name="DefaultParagraphFont" style:family="text">
      <style:text-properties fo:font-size="12pt" style:font-size-asian="12pt" style:font-size-complex="12pt" fo:language="en" fo:country="US"/>
    </style:style>
    <style:style style:name="T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7"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P8"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9"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10"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11"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12"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13"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14"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15"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16"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17"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18"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19"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20"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21"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22"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23"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24"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25"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26"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27"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28"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29"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en" fo:country="US"/>
    </style:style>
    <style:style style:name="P30" style:parent-style-name="Normal" style:family="paragraph">
      <style:paragraph-properties fo:margin-left="1in" fo:text-indent="0.5in">
        <style:tab-stops/>
      </style:paragraph-properties>
      <style:text-properties fo:font-size="12pt" style:font-size-asian="12pt" style:font-size-complex="12pt" fo:language="en" fo:country="US"/>
    </style:style>
    <style:style style:name="P31" style:parent-style-name="Normal" style:family="paragraph">
      <style:paragraph-properties fo:text-align="center"/>
      <style:text-properties fo:font-weight="bold" style:font-weight-asian="bold" style:font-weight-complex="bold" fo:font-size="12pt" style:font-size-asian="12pt" style:font-size-complex="12pt" fo:language="en" fo:country="US"/>
    </style:style>
    <style:style style:name="P32" style:parent-style-name="Normal" style:family="paragraph">
      <style:text-properties fo:font-size="12pt" style:font-size-asian="12pt" style:font-size-complex="12pt" fo:language="en" fo:country="US"/>
    </style:style>
    <style:style style:name="P33" style:parent-style-name="Normal" style:family="paragraph">
      <style:text-properties fo:font-weight="bold" style:font-weight-asian="bold" style:font-weight-complex="bold" fo:font-size="12pt" style:font-size-asian="12pt" style:font-size-complex="12pt"/>
    </style:style>
    <style:style style:name="P34" style:parent-style-name="Normal" style:family="paragraph">
      <style:paragraph-properties fo:margin-left="0.5in" fo:text-indent="-0.5in">
        <style:tab-stops/>
      </style:paragraph-properties>
    </style:style>
    <style:style style:name="T3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6" style:parent-style-name="DefaultParagraphFont" style:family="text">
      <style:text-properties fo:font-size="12pt" style:font-size-asian="12pt" style:font-size-complex="12pt"/>
    </style:style>
    <style:style style:name="P37" style:parent-style-name="Normal" style:family="paragraph">
      <style:paragraph-properties fo:margin-left="0.5in" fo:text-indent="-0.5in">
        <style:tab-stops/>
      </style:paragraph-properties>
    </style:style>
    <style:style style:name="T3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 style:parent-style-name="DefaultParagraphFont" style:family="text">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weight="bold" style:font-weight-asian="bold" style:font-weight-complex="bold" fo:font-size="12pt" style:font-size-asian="12pt" style:font-size-complex="12pt"/>
    </style:style>
    <style:style style:name="P42" style:parent-style-name="Normal" style:list-style-name="LFO5" style:family="paragraph">
      <style:text-properties fo:font-size="12pt" style:font-size-asian="12pt" style:font-size-complex="12pt"/>
    </style:style>
    <style:style style:name="P43" style:parent-style-name="Normal" style:list-style-name="LFO5" style:family="paragraph">
      <style:text-properties fo:font-size="12pt" style:font-size-asian="12pt" style:font-size-complex="12pt"/>
    </style:style>
    <style:style style:name="P44" style:parent-style-name="Normal" style:list-style-name="LFO5" style:family="paragraph">
      <style:text-properties fo:font-size="12pt" style:font-size-asian="12pt" style:font-size-complex="12pt"/>
    </style:style>
    <style:style style:name="P45" style:parent-style-name="Normal" style:list-style-name="LFO5" style:family="paragraph">
      <style:text-properties fo:font-size="12pt" style:font-size-asian="12pt" style:font-size-complex="12pt"/>
    </style:style>
    <style:style style:name="P46" style:parent-style-name="Normal" style:list-style-name="LFO5" style:family="paragraph">
      <style:text-properties fo:font-size="12pt" style:font-size-asian="12pt" style:font-size-complex="12pt"/>
    </style:style>
    <style:style style:name="P47" style:parent-style-name="Normal" style:list-style-name="LFO5" style:family="paragraph">
      <style:text-properties fo:font-size="12pt" style:font-size-asian="12pt" style:font-size-complex="12pt"/>
    </style:style>
    <style:style style:name="P48" style:parent-style-name="Normal" style:family="paragraph">
      <style:text-properties fo:font-weight="bold" style:font-weight-asian="bold" style:font-weight-complex="bold" fo:font-size="12pt" style:font-size-asian="12pt" style:font-size-complex="12pt"/>
    </style:style>
    <style:style style:name="P49" style:parent-style-name="Normal" style:list-style-name="LFO6" style:family="paragraph">
      <style:text-properties fo:font-size="12pt" style:font-size-asian="12pt" style:font-size-complex="12pt"/>
    </style:style>
    <style:style style:name="P50" style:parent-style-name="Normal" style:list-style-name="LFO6" style:family="paragraph">
      <style:text-properties fo:font-size="12pt" style:font-size-asian="12pt" style:font-size-complex="12pt"/>
    </style:style>
    <style:style style:name="P51" style:parent-style-name="Normal" style:list-style-name="LFO6" style:family="paragraph">
      <style:text-properties fo:font-size="12pt" style:font-size-asian="12pt" style:font-size-complex="12pt"/>
    </style:style>
    <style:style style:name="P52" style:parent-style-name="Normal" style:list-style-name="LFO6" style:family="paragraph">
      <style:text-properties fo:font-size="12pt" style:font-size-asian="12pt" style:font-size-complex="12pt"/>
    </style:style>
    <style:style style:name="P53" style:parent-style-name="Normal" style:list-style-name="LFO6" style:family="paragraph">
      <style:text-properties fo:font-size="12pt" style:font-size-asian="12pt" style:font-size-complex="12pt"/>
    </style:style>
    <style:style style:name="P54" style:parent-style-name="Normal" style:family="paragraph">
      <style:text-properties fo:font-size="12pt" style:font-size-asian="12pt" style:font-size-complex="12pt" fo:language="en" fo:country="US"/>
    </style:style>
  </office:automatic-styles>
  <office:body>
    <office:text text:use-soft-page-breaks="true">
      <text:p text:style-name="P1">UNIVERSITY OF ARKANSAS AT PINE BLUFF</text:p>
      <text:p text:style-name="P2">OFFICE OF RESEARCH, INNOVATION, AND ECONOMIC DEVELOPMENT (RIED)</text:p>
      <text:p text:style-name="P3"/>
      <text:p text:style-name="P4"><text:span text:style-name="T5">PROJECT:<text:s/></text:span><text:span text:style-name="T6">OPPORTUNITIES DASHBOAR</text:span><text:span text:style-name="T7">D</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SOFTWARE<text:s/>REQUIREMENTS<text:s/>SPECIFICATION<text:s/>s</text:p>
      <text:p text:style-name="P32"/>
      <text:p text:style-name="P33">1. Introduction</text:p>
      <text:p text:style-name="P34"><text:span text:style-name="T35">Purpose</text:span><text:span text:style-name="T36">: The purpose of the Opportunities dashboard is to allow UAPB students easy access to a wide range of opportunities on a centralized, easy-to-find page. Hosted on the RIED homepage, the dashboard will display research opportunities, internships, and summer programs applicable to students of all majors. The dashboard will allow students to find more information about their desired opportunities by interacting with the links, email addresses, and phone numbers associated with each listing.</text:span></text:p>
      <text:p text:style-name="P37"><text:span text:style-name="T38">Scope:</text:span><text:span text:style-name="T39"><text:s/>The first iteration of the Opportunities dashboard will strictly show Research Opportunities from various universities around the country. Each displayed opportunity will feature a short summary of the program, contact information such as emails or phone numbers, and a direct link to the application page. To drive urgency, each program will show when the opportunity was displayed, the firm application deadline, and a dynamic calculation of how many days are left to apply. Each program will have information outlining specific eligibility requirements and target fields of study.</text:span></text:p>
      <text:p text:style-name="P40"/>
      <text:p text:style-name="P41">2. Functional Requirements</text:p>
      <text:list text:style-name="LFO5" text:continue-numbering="true">
        <text:list-item>
          <text:p text:style-name="P42">The system shall categorize opportunities into defined types, starting specifically with "Off-campus summer research program" for Version 1, while supporting future categories like "On-campus jobs".</text:p>
        </text:list-item>
        <text:list-item>
          <text:p text:style-name="P43">The system shall dynamically calculate and display a countdown of days remaining to apply based on the current system date and the application deadline.</text:p>
        </text:list-item>
        <text:list-item>
          <text:p text:style-name="P44">The system shall automatically filter out or visually archive an opportunity once its application deadline has passed.</text:p>
        </text:list-item>
        <text:list-item>
          <text:p text:style-name="P45">The system shall provide a search bar allowing students to query active opportunities by keyword, university name, or program title.</text:p>
        </text:list-item>
        <text:list-item>
          <text:p text:style-name="P46">The system shall provide basic sorting capabilities, allowing users to order opportunities by the<text:s/>latest posted opportunity.</text:p>
        </text:list-item>
        <text:list-item>
          <text:p text:style-name="P47">The system shall include a secure, administrative data-entry interface (or support a structured CSV/JSON upload) for RIED staff to input new programs without requiring code changes.</text:p>
        </text:list-item>
      </text:list>
      <text:p text:style-name="P48">3. Non-Functional Requirements</text:p>
      <text:list text:style-name="LFO6" text:continue-numbering="true">
        <text:list-item>
          <text:p text:style-name="P49">Usability (Responsive Design): The dashboard must be fully responsive, providing an optimized viewing and interaction experience across mobile devices, tablets, and desktops.</text:p>
        </text:list-item>
        <text:list-item>
          <text:p text:style-name="P50">Performance: The dashboard shall load the initial list of active opportunities in under 2 seconds on standard university Wi-Fi to minimize user bounce rates.</text:p>
        </text:list-item>
        <text:list-item>
          <text:p text:style-name="P51">Accessibility: The user interface must adhere to basic WCAG 2.1 AA accessibility guidelines, ensuring adequate color contrast and structural semantics for screen readers.</text:p>
        </text:list-item>
        <text:list-item>
          <text:p text:style-name="P52">Security: Administrative interfaces used to add, edit, or remove opportunities must be secured behind standard UAPB single sign-on (SSO) or robust role-based authentication.</text:p>
        </text:list-item>
        <text:list-item>
          <text:p text:style-name="P53">Maintainability: The frontend architecture should be modular and clearly documented to ensure smooth handoffs to future student developers or RIED IT staff.</text:p>
        </text:list-item>
      </text:list>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gel Yuzya</meta:initial-creator>
    <dc:creator>Angel Yuzya</dc:creator>
    <meta:creation-date>2026-04-01T05:25:00Z</meta:creation-date>
    <dc:date>2026-04-05T16:59:00Z</dc:date>
    <meta:template xlink:href="Normal" xlink:type="simple"/>
    <meta:editing-cycles>3</meta:editing-cycles>
    <meta:editing-duration>PT337320S</meta:editing-duration>
    <meta:user-defined meta:name="MSIP_Label_da8f5f46-a041-4281-8d28-60e5f3a66ae0_Enabled">true</meta:user-defined>
    <meta:user-defined meta:name="MSIP_Label_da8f5f46-a041-4281-8d28-60e5f3a66ae0_SetDate">2026-04-01T05:55:06Z</meta:user-defined>
    <meta:user-defined meta:name="MSIP_Label_da8f5f46-a041-4281-8d28-60e5f3a66ae0_Method">Standard</meta:user-defined>
    <meta:user-defined meta:name="MSIP_Label_da8f5f46-a041-4281-8d28-60e5f3a66ae0_Name">Non-Sensitive Label</meta:user-defined>
    <meta:user-defined meta:name="MSIP_Label_da8f5f46-a041-4281-8d28-60e5f3a66ae0_SiteId">48a10848-c740-4d38-8280-7c1d0af20242</meta:user-defined>
    <meta:user-defined meta:name="MSIP_Label_da8f5f46-a041-4281-8d28-60e5f3a66ae0_ActionId">f77d9a23-8005-4be9-b1e4-173b0f1bb9b5</meta:user-defined>
    <meta:user-defined meta:name="MSIP_Label_da8f5f46-a041-4281-8d28-60e5f3a66ae0_ContentBits">0</meta:user-defined>
    <meta:user-defined meta:name="MSIP_Label_da8f5f46-a041-4281-8d28-60e5f3a66ae0_Tag">10, 3, 0, 1</meta:user-defined>
    <meta:document-statistic meta:page-count="1" meta:paragraph-count="6" meta:word-count="464" meta:character-count="3104" meta:row-count="22" meta:non-whitespace-character-count="2646"/>
  </office:meta>
</office:document-meta>
</file>