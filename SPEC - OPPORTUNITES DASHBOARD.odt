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2pt" style:font-size-asian="12pt" style:font-size-complex="12pt" fo:language="en" fo:country="US"/>
    </style:style>
    <style:style style:name="P2" style:parent-style-name="Normal" style:family="paragraph">
      <style:paragraph-properties fo:text-align="center"/>
      <style:text-properties fo:font-size="12pt" style:font-size-asian="12pt" style:font-size-complex="12pt" fo:language="en" fo:country="US"/>
    </style:style>
    <style:style style:name="T3" style:parent-style-name="DefaultParagraphFont" style:family="text">
      <style:text-properties fo:font-weight="bold" style:font-weight-asian="bold" style:font-weight-complex="bold" fo:font-size="12pt" style:font-size-asian="12pt" style:font-size-complex="12pt"/>
    </style:style>
    <style:style style:name="T4" style:parent-style-name="DefaultParagraphFont" style:family="text">
      <style:text-properties fo:font-size="12pt" style:font-size-asian="12pt" style:font-size-complex="12pt"/>
    </style:style>
    <style:style style:name="T5" style:parent-style-name="DefaultParagraphFont" style:family="text">
      <style:text-properties fo:font-weight="bold" style:font-weight-asian="bold" style:font-weight-complex="bold" fo:font-size="12pt" style:font-size-asian="12pt" style:font-size-complex="12pt"/>
    </style:style>
    <style:style style:name="T6" style:parent-style-name="DefaultParagraphFont" style:family="text">
      <style:text-properties fo:font-size="12pt" style:font-size-asian="12pt" style:font-size-complex="12pt"/>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fo:font-size="12pt" style:font-size-asian="12pt" style:font-size-complex="12pt"/>
    </style:style>
    <style:style style:name="T9" style:parent-style-name="DefaultParagraphFont" style:family="text">
      <style:text-properties fo:font-weight="bold" style:font-weight-asian="bold" style:font-weight-complex="bold" fo:font-size="12pt" style:font-size-asian="12pt" style:font-size-complex="12pt"/>
    </style:style>
    <style:style style:name="P10" style:parent-style-name="Normal" style:list-style-name="LFO1" style:family="paragraph"/>
    <style:style style:name="T11" style:parent-style-name="DefaultParagraphFont" style:family="text">
      <style:text-properties fo:font-weight="bold" style:font-weight-asian="bold" style:font-weight-complex="bold" fo:font-size="12pt" style:font-size-asian="12pt" style:font-size-complex="12pt"/>
    </style:style>
    <style:style style:name="T12" style:parent-style-name="DefaultParagraphFont" style:family="text">
      <style:text-properties fo:font-size="12pt" style:font-size-asian="12pt" style:font-size-complex="12pt"/>
    </style:style>
    <style:style style:name="P13" style:parent-style-name="Normal" style:list-style-name="LFO1" style:family="paragraph"/>
    <style:style style:name="T14" style:parent-style-name="DefaultParagraphFont" style:family="text">
      <style:text-properties fo:font-weight="bold" style:font-weight-asian="bold" style:font-weight-complex="bold" fo:font-size="12pt" style:font-size-asian="12pt" style:font-size-complex="12pt"/>
    </style:style>
    <style:style style:name="T15" style:parent-style-name="DefaultParagraphFont" style:family="text">
      <style:text-properties fo:font-size="12pt" style:font-size-asian="12pt" style:font-size-complex="12pt"/>
    </style:style>
    <style:style style:name="P16" style:parent-style-name="Normal" style:list-style-name="LFO1" style:family="paragraph"/>
    <style:style style:name="T17" style:parent-style-name="DefaultParagraphFont" style:family="text">
      <style:text-properties fo:font-weight="bold" style:font-weight-asian="bold" style:font-weight-complex="bold" fo:font-size="12pt" style:font-size-asian="12pt" style:font-size-complex="12pt"/>
    </style:style>
    <style:style style:name="T18" style:parent-style-name="DefaultParagraphFont" style:family="text">
      <style:text-properties fo:font-size="12pt" style:font-size-asian="12pt" style:font-size-complex="12pt"/>
    </style:style>
    <style:style style:name="P19" style:parent-style-name="Normal" style:list-style-name="LFO1" style:family="paragraph"/>
    <style:style style:name="T20" style:parent-style-name="DefaultParagraphFont" style:family="text">
      <style:text-properties fo:font-weight="bold" style:font-weight-asian="bold" style:font-weight-complex="bold" fo:font-size="12pt" style:font-size-asian="12pt" style:font-size-complex="12pt"/>
    </style:style>
    <style:style style:name="T21" style:parent-style-name="DefaultParagraphFont" style:family="text">
      <style:text-properties fo:font-size="12pt" style:font-size-asian="12pt" style:font-size-complex="12pt"/>
    </style:style>
    <style:style style:name="P22" style:parent-style-name="Normal" style:list-style-name="LFO1" style:family="paragraph"/>
    <style:style style:name="T23" style:parent-style-name="DefaultParagraphFont" style:family="text">
      <style:text-properties fo:font-weight="bold" style:font-weight-asian="bold" style:font-weight-complex="bold" fo:font-size="12pt" style:font-size-asian="12pt" style:font-size-complex="12pt"/>
    </style:style>
    <style:style style:name="T24" style:parent-style-name="DefaultParagraphFont" style:family="text">
      <style:text-properties fo:font-size="12pt" style:font-size-asian="12pt" style:font-size-complex="12pt"/>
    </style:style>
    <style:style style:name="P25" style:parent-style-name="Normal" style:list-style-name="LFO1" style:family="paragraph"/>
    <style:style style:name="T26" style:parent-style-name="DefaultParagraphFont" style:family="text">
      <style:text-properties fo:font-weight="bold" style:font-weight-asian="bold" style:font-weight-complex="bold" fo:font-size="12pt" style:font-size-asian="12pt" style:font-size-complex="12pt"/>
    </style:style>
    <style:style style:name="T27" style:parent-style-name="DefaultParagraphFont" style:family="text">
      <style:text-properties fo:font-size="12pt" style:font-size-asian="12pt" style:font-size-complex="12pt"/>
    </style:style>
    <style:style style:name="T28" style:parent-style-name="DefaultParagraphFont" style:family="text">
      <style:text-properties fo:font-weight="bold" style:font-weight-asian="bold" style:font-weight-complex="bold"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Normal" style:family="paragraph">
      <style:text-properties fo:font-size="12pt" style:font-size-asian="12pt" style:font-size-complex="12pt"/>
    </style:style>
    <style:style style:name="P35" style:parent-style-name="Normal" style:family="paragraph">
      <style:text-properties fo:font-size="12pt" style:font-size-asian="12pt" style:font-size-complex="12pt"/>
    </style:style>
    <style:style style:name="P36" style:parent-style-name="Normal" style:family="paragraph">
      <style:text-properties fo:font-size="12pt" style:font-size-asian="12pt" style:font-size-complex="12pt"/>
    </style:style>
    <style:style style:name="P37" style:parent-style-name="Normal" style:family="paragraph">
      <style:text-properties fo:font-size="12pt" style:font-size-asian="12pt" style:font-size-complex="12pt"/>
    </style:style>
    <style:style style:name="P38" style:parent-style-name="Normal" style:family="paragraph">
      <style:text-properties fo:font-size="12pt" style:font-size-asian="12pt" style:font-size-complex="12pt"/>
    </style:style>
    <style:style style:name="P39" style:parent-style-name="Normal" style:family="paragraph">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T47" style:parent-style-name="DefaultParagraphFont" style:family="text">
      <style:text-properties fo:font-weight="bold" style:font-weight-asian="bold" style:font-weight-complex="bold"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T51" style:parent-style-name="DefaultParagraphFont" style:family="text">
      <style:text-properties style:font-name="MS Gothic" style:font-name-asian="MS Gothic" style:font-name-complex="MS Gothic" fo:font-size="12pt" style:font-size-asian="12pt" style:font-size-complex="12pt"/>
    </style:style>
    <style:style style:name="T52" style:parent-style-name="DefaultParagraphFont" style:family="text">
      <style:text-properties style:font-name="Aptos" style:font-name-complex="Aptos" fo:font-size="12pt" style:font-size-asian="12pt" style:font-size-complex="12pt"/>
    </style:style>
    <style:style style:name="T53" style:parent-style-name="DefaultParagraphFont" style:family="text">
      <style:text-properties fo:font-size="12pt" style:font-size-asian="12pt" style:font-size-complex="12pt"/>
    </style:style>
    <style:style style:name="T54" style:parent-style-name="DefaultParagraphFont" style:family="text">
      <style:text-properties fo:font-size="12pt" style:font-size-asian="12pt" style:font-size-complex="12pt"/>
    </style:style>
    <style:style style:name="T55" style:parent-style-name="DefaultParagraphFont" style:family="text">
      <style:text-properties style:font-name="MS Gothic" style:font-name-asian="MS Gothic" style:font-name-complex="MS Gothic" fo:font-size="12pt" style:font-size-asian="12pt" style:font-size-complex="12pt"/>
    </style:style>
    <style:style style:name="T56" style:parent-style-name="DefaultParagraphFont" style:family="text">
      <style:text-properties style:font-name="Aptos" style:font-name-complex="Aptos" fo:font-size="12pt" style:font-size-asian="12pt" style:font-size-complex="12pt"/>
    </style:style>
    <style:style style:name="T57" style:parent-style-name="DefaultParagraphFont" style:family="text">
      <style:text-properties fo:font-size="12pt" style:font-size-asian="12pt" style:font-size-complex="12pt"/>
    </style:style>
    <style:style style:name="T58" style:parent-style-name="DefaultParagraphFont" style:family="text">
      <style:text-properties fo:font-size="12pt" style:font-size-asian="12pt" style:font-size-complex="12pt"/>
    </style:style>
    <style:style style:name="T59" style:parent-style-name="DefaultParagraphFont" style:family="text">
      <style:text-properties style:font-name="MS Gothic" style:font-name-asian="MS Gothic" style:font-name-complex="MS Gothic" fo:font-size="12pt" style:font-size-asian="12pt" style:font-size-complex="12pt"/>
    </style:style>
    <style:style style:name="T60" style:parent-style-name="DefaultParagraphFont" style:family="text">
      <style:text-properties style:font-name="Aptos" style:font-name-complex="Aptos" fo:font-size="12pt" style:font-size-asian="12pt" style:font-size-complex="12pt"/>
    </style:style>
    <style:style style:name="T61" style:parent-style-name="DefaultParagraphFont" style:family="text">
      <style:text-properties fo:font-size="12pt" style:font-size-asian="12pt" style:font-size-complex="12pt"/>
    </style:style>
    <style:style style:name="P62" style:parent-style-name="Normal" style:family="paragraph">
      <style:text-properties fo:font-size="12pt" style:font-size-asian="12pt" style:font-size-complex="12pt"/>
    </style:style>
    <style:style style:name="T63" style:parent-style-name="DefaultParagraphFont" style:family="text">
      <style:text-properties style:font-name="MS Gothic" style:font-name-asian="MS Gothic" style:font-name-complex="MS Gothic" fo:font-size="12pt" style:font-size-asian="12pt" style:font-size-complex="12pt"/>
    </style:style>
    <style:style style:name="T64" style:parent-style-name="DefaultParagraphFont" style:family="text">
      <style:text-properties style:font-name="Aptos" style:font-name-complex="Aptos" fo:font-size="12pt" style:font-size-asian="12pt" style:font-size-complex="12pt"/>
    </style:style>
    <style:style style:name="T65" style:parent-style-name="DefaultParagraphFont" style:family="text">
      <style:text-properties fo:font-size="12pt" style:font-size-asian="12pt" style:font-size-complex="12pt"/>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style:font-name="MS Gothic" style:font-name-asian="MS Gothic" style:font-name-complex="MS Gothic" fo:font-size="12pt" style:font-size-asian="12pt" style:font-size-complex="12pt"/>
    </style:style>
    <style:style style:name="T68" style:parent-style-name="DefaultParagraphFont" style:family="text">
      <style:text-properties style:font-name="Aptos" style:font-name-complex="Aptos" fo:font-size="12pt" style:font-size-asian="12pt" style:font-size-complex="12pt"/>
    </style:style>
    <style:style style:name="T69" style:parent-style-name="DefaultParagraphFont" style:family="text">
      <style:text-properties fo:font-size="12pt" style:font-size-asian="12pt" style:font-size-complex="12pt"/>
    </style:style>
    <style:style style:name="T70" style:parent-style-name="DefaultParagraphFont" style:family="text">
      <style:text-properties fo:font-size="12pt" style:font-size-asian="12pt" style:font-size-complex="12pt"/>
    </style:style>
    <style:style style:name="T71" style:parent-style-name="DefaultParagraphFont" style:family="text">
      <style:text-properties style:font-name="MS Gothic" style:font-name-asian="MS Gothic" style:font-name-complex="MS Gothic" fo:font-size="12pt" style:font-size-asian="12pt" style:font-size-complex="12pt"/>
    </style:style>
    <style:style style:name="T72" style:parent-style-name="DefaultParagraphFont" style:family="text">
      <style:text-properties style:font-name="Aptos" style:font-name-complex="Aptos" fo:font-size="12pt" style:font-size-asian="12pt" style:font-size-complex="12pt"/>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style:font-name="MS Gothic" style:font-name-asian="MS Gothic" style:font-name-complex="MS Gothic" fo:font-size="12pt" style:font-size-asian="12pt" style:font-size-complex="12pt"/>
    </style:style>
    <style:style style:name="T76" style:parent-style-name="DefaultParagraphFont" style:family="text">
      <style:text-properties style:font-name="Aptos" style:font-name-complex="Aptos" fo:font-size="12pt" style:font-size-asian="12pt" style:font-size-complex="12pt"/>
    </style:style>
    <style:style style:name="T77" style:parent-style-name="DefaultParagraphFont" style:family="text">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T79" style:parent-style-name="DefaultParagraphFont" style:family="text">
      <style:text-properties style:font-name="MS Gothic" style:font-name-asian="MS Gothic" style:font-name-complex="MS Gothic" fo:font-size="12pt" style:font-size-asian="12pt" style:font-size-complex="12pt"/>
    </style:style>
    <style:style style:name="T80" style:parent-style-name="DefaultParagraphFont" style:family="text">
      <style:text-properties style:font-name="Aptos" style:font-name-complex="Aptos" fo:font-size="12pt" style:font-size-asian="12pt" style:font-size-complex="12pt"/>
    </style:style>
    <style:style style:name="T81" style:parent-style-name="DefaultParagraphFont" style:family="text">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T83" style:parent-style-name="DefaultParagraphFont" style:family="text">
      <style:text-properties style:font-name="MS Gothic" style:font-name-asian="MS Gothic" style:font-name-complex="MS Gothic" fo:font-size="12pt" style:font-size-asian="12pt" style:font-size-complex="12pt"/>
    </style:style>
    <style:style style:name="T84" style:parent-style-name="DefaultParagraphFont" style:family="text">
      <style:text-properties style:font-name="Aptos" style:font-name-complex="Aptos" fo:font-size="12pt" style:font-size-asian="12pt" style:font-size-complex="12pt"/>
    </style:style>
    <style:style style:name="T85" style:parent-style-name="DefaultParagraphFont" style:family="text">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P88" style:parent-style-name="Normal" style:family="paragraph">
      <style:text-properties fo:font-size="12pt" style:font-size-asian="12pt" style:font-size-complex="12pt"/>
    </style:style>
    <style:style style:name="T89" style:parent-style-name="DefaultParagraphFont" style:family="text">
      <style:text-properties fo:font-weight="bold" style:font-weight-asian="bold" style:font-weight-complex="bold"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list-style-name="LFO2" style:family="paragraph"/>
    <style:style style:name="T92" style:parent-style-name="DefaultParagraphFont" style:family="text">
      <style:text-properties fo:font-weight="bold" style:font-weight-asian="bold" style:font-weight-complex="bold" fo:font-size="12pt" style:font-size-asian="12pt" style:font-size-complex="12pt"/>
    </style:style>
    <style:style style:name="T93" style:parent-style-name="DefaultParagraphFont" style:family="text">
      <style:text-properties fo:font-size="12pt" style:font-size-asian="12pt" style:font-size-complex="12pt"/>
    </style:style>
    <style:style style:name="P94" style:parent-style-name="Normal" style:list-style-name="LFO2" style:family="paragraph"/>
    <style:style style:name="T95" style:parent-style-name="DefaultParagraphFont" style:family="text">
      <style:text-properties fo:font-weight="bold" style:font-weight-asian="bold" style:font-weight-complex="bold" fo:font-size="12pt" style:font-size-asian="12pt" style:font-size-complex="12pt"/>
    </style:style>
    <style:style style:name="T96" style:parent-style-name="DefaultParagraphFont" style:family="text">
      <style:text-properties fo:font-size="12pt" style:font-size-asian="12pt" style:font-size-complex="12pt"/>
    </style:style>
    <style:style style:name="P97" style:parent-style-name="Normal" style:list-style-name="LFO2" style:family="paragraph"/>
    <style:style style:name="T98" style:parent-style-name="DefaultParagraphFont" style:family="text">
      <style:text-properties fo:font-weight="bold" style:font-weight-asian="bold" style:font-weight-complex="bold" fo:font-size="12pt" style:font-size-asian="12pt" style:font-size-complex="12pt"/>
    </style:style>
    <style:style style:name="T99" style:parent-style-name="DefaultParagraphFont" style:family="text">
      <style:text-properties fo:font-size="12pt" style:font-size-asian="12pt" style:font-size-complex="12pt"/>
    </style:style>
    <style:style style:name="P100" style:parent-style-name="Normal" style:list-style-name="LFO2" style:family="paragraph">
      <style:text-properties fo:font-size="12pt" style:font-size-asian="12pt" style:font-size-complex="12pt"/>
    </style:style>
    <style:style style:name="P101" style:parent-style-name="Normal" style:list-style-name="LFO2" style:family="paragraph">
      <style:text-properties fo:font-size="12pt" style:font-size-asian="12pt" style:font-size-complex="12pt"/>
    </style:style>
    <style:style style:name="P102" style:parent-style-name="Normal" style:list-style-name="LFO2" style:family="paragraph"/>
    <style:style style:name="T103" style:parent-style-name="DefaultParagraphFont" style:family="text">
      <style:text-properties fo:font-weight="bold" style:font-weight-asian="bold" style:font-weight-complex="bold" fo:font-size="12pt" style:font-size-asian="12pt" style:font-size-complex="12pt"/>
    </style:style>
    <style:style style:name="T104" style:parent-style-name="DefaultParagraphFont" style:family="text">
      <style:text-properties fo:font-size="12pt" style:font-size-asian="12pt" style:font-size-complex="12pt"/>
    </style:style>
    <style:style style:name="P105" style:parent-style-name="Normal" style:list-style-name="LFO2" style:family="paragraph"/>
    <style:style style:name="T106" style:parent-style-name="DefaultParagraphFont" style:family="text">
      <style:text-properties fo:font-weight="bold" style:font-weight-asian="bold" style:font-weight-complex="bold" fo:font-size="12pt" style:font-size-asian="12pt" style:font-size-complex="12pt"/>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fo:font-weight="bold" style:font-weight-asian="bold" style:font-weight-complex="bold" fo:font-size="12pt" style:font-size-asian="12pt" style:font-size-complex="12pt"/>
    </style:style>
    <style:style style:name="P109" style:parent-style-name="Normal" style:family="paragraph">
      <style:text-properties fo:font-size="12pt" style:font-size-asian="12pt" style:font-size-complex="12pt"/>
    </style:style>
    <style:style style:name="P110" style:parent-style-name="Normal" style:family="paragraph">
      <style:text-properties fo:font-size="12pt" style:font-size-asian="12pt" style:font-size-complex="12pt"/>
    </style:style>
    <style:style style:name="P111"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112" style:parent-style-name="DefaultParagraphFont" style:family="text">
      <style:text-properties fo:font-size="12pt" style:font-size-asian="12pt" style:font-size-complex="12pt"/>
    </style:style>
    <style:style style:name="T113" style:parent-style-name="DefaultParagraphFont" style:family="text">
      <style:text-properties fo:font-weight="bold" style:font-weight-asian="bold" style:font-weight-complex="bold" fo:font-size="12pt" style:font-size-asian="12pt" style:font-size-complex="12pt"/>
    </style:style>
    <style:style style:name="P114" style:parent-style-name="Normal" style:family="paragraph">
      <style:text-properties fo:font-size="12pt" style:font-size-asian="12pt" style:font-size-complex="12pt"/>
    </style:style>
    <style:style style:name="P115" style:parent-style-name="Normal" style:family="paragraph">
      <style:text-properties fo:font-size="12pt" style:font-size-asian="12pt" style:font-size-complex="12pt"/>
    </style:style>
    <style:style style:name="P116" style:parent-style-name="Normal" style:family="paragraph">
      <style:text-properties fo:font-size="12pt" style:font-size-asian="12pt" style:font-size-complex="12pt"/>
    </style:style>
    <style:style style:name="P117" style:parent-style-name="Normal" style:family="paragraph">
      <style:text-properties fo:font-size="12pt" style:font-size-asian="12pt" style:font-size-complex="12pt"/>
    </style:style>
    <style:style style:name="P118" style:parent-style-name="Normal" style:family="paragraph">
      <style:text-properties fo:font-size="12pt" style:font-size-asian="12pt" style:font-size-complex="12pt"/>
    </style:style>
    <style:style style:name="P119" style:parent-style-name="Normal" style:family="paragraph">
      <style:text-properties fo:font-size="12pt" style:font-size-asian="12pt" style:font-size-complex="12pt"/>
    </style:style>
    <style:style style:name="T120" style:parent-style-name="DefaultParagraphFont" style:family="text">
      <style:text-properties fo:font-size="12pt" style:font-size-asian="12pt" style:font-size-complex="12pt" fo:language="en" fo:country="US"/>
    </style:style>
    <style:style style:name="P121" style:parent-style-name="Normal" style:family="paragraph">
      <style:text-properties fo:font-size="12pt" style:font-size-asian="12pt" style:font-size-complex="12pt" fo:language="en" fo:country="US"/>
    </style:style>
    <style:style style:name="T122" style:parent-style-name="DefaultParagraphFont" style:family="text">
      <style:text-properties fo:font-size="12pt" style:font-size-asian="12pt" style:font-size-complex="12pt" fo:language="en" fo:country="US"/>
    </style:style>
    <style:style style:family="graphic" style:name="a0" style:parent-style-name="Graphics">
      <style:graphic-properties fo:border="none" fo:background-color="transparent"/>
    </style:style>
  </office:automatic-styles>
  <office:body>
    <office:text text:use-soft-page-breaks="true">
      <text:p text:style-name="P1">OPPORTUNITES DASHBOARD<text:s/></text:p>
      <text:p text:style-name="P2">SPEC FILE</text:p>
      <text:p text:style-name="Normal"><text:span text:style-name="T3">Role:</text:span><text:span text:style-name="T4"><text:s/>You are an expert Senior Frontend Engineer assisting a junior developer in building a modern web application.</text:span></text:p>
      <text:p text:style-name="Normal"><text:span text:style-name="T5">Project Overview:</text:span><text:span text:style-name="T6"><text:s/>We are building the "Opportunities Dashboard" for the Office of Research, Innovation, and Economic Development (RIED) at the University of Arkansas at Pine Bluff (UAPB). It is a centralized directory for students to find<text:s/></text:span><text:span text:style-name="T7">On-campus and<text:s/></text:span><text:span text:style-name="T8">Off-campus summer research programs.</text:span></text:p>
      <text:p text:style-name="Normal"><text:span text:style-name="T9">Tech Stack:</text:span></text:p>
      <text:list text:style-name="LFO1" text:continue-numbering="true">
        <text:list-item>
          <text:p text:style-name="P10"><text:span text:style-name="T11">Framework:</text:span><text:span text:style-name="T12"><text:s/>Next.js (latest version, using the App Router src/app)</text:span></text:p>
        </text:list-item>
        <text:list-item>
          <text:p text:style-name="P13"><text:span text:style-name="T14">UI Library:</text:span><text:span text:style-name="T15"><text:s/>React (Functional components with Hooks)</text:span></text:p>
        </text:list-item>
        <text:list-item>
          <text:p text:style-name="P16"><text:span text:style-name="T17">Language:</text:span><text:span text:style-name="T18"><text:s/>TypeScript (Strict mode enabled)</text:span></text:p>
        </text:list-item>
        <text:list-item>
          <text:p text:style-name="P19"><text:span text:style-name="T20">Styling:</text:span><text:span text:style-name="T21"><text:s/>Tailwind CSS</text:span></text:p>
        </text:list-item>
        <text:list-item>
          <text:p text:style-name="P22"><text:span text:style-name="T23">Data Fetching:</text:span><text:span text:style-name="T24"><text:s/>Local JSON file import (Mock database for MVP)</text:span></text:p>
        </text:list-item>
        <text:list-item>
          <text:p text:style-name="P25"><text:span text:style-name="T26">Icons:</text:span><text:span text:style-name="T27"><text:s/>lucide-react (or similar lightweight SVG icon library)</text:span></text:p>
        </text:list-item>
      </text:list>
      <text:p text:style-name="Normal"><text:span text:style-name="T28">1. Data Model (TypeScript Interfaces)</text:span></text:p>
      <text:p text:style-name="P29">Please enforce strict typing. This is the shape of the data that will live in src/data/opportunities.json.</text:p>
      <text:p text:style-name="P30">TypeScript</text:p>
      <text:p text:style-name="P31">// src/types/index.ts</text:p>
      <text:p text:style-name="P32">export type OpportunityCategory = "Off-campus summer research program" | "On-campus job";</text:p>
      <text:p text:style-name="P33"/>
      <text:p text:style-name="P34">export interface Opportunity {</text:p>
      <text:p text:style-name="P35"><text:s text:c="2"/>id: string; // Unique UUID</text:p>
      <text:p text:style-name="P36"><text:s text:c="2"/>title: string; // Name of the program</text:p>
      <text:p text:style-name="P37"><text:s text:c="2"/>institution: string; // e.g., "Michigan State University"</text:p>
      <text:p text:style-name="P38"><text:s text:c="2"/>summary: string; // 2-3 sentence description</text:p>
      <text:p text:style-name="P39"><text:s text:c="2"/>contactEmail?: string; // Optional</text:p>
      <text:soft-page-break/>
      <text:p text:style-name="P40"><text:s text:c="2"/>contactPhone?: string; // Optional</text:p>
      <text:p text:style-name="P41"><text:s text:c="2"/>applicationUrl: string; // Link to apply</text:p>
      <text:p text:style-name="P42"><text:s text:c="2"/>datePosted: string; // ISO Date string (YYYY-MM-DD)</text:p>
      <text:p text:style-name="P43"><text:s text:c="2"/>deadline: string; // ISO Date string (YYYY-MM-DD)</text:p>
      <text:p text:style-name="P44"><text:s text:c="2"/>category: OpportunityCategory;</text:p>
      <text:p text:style-name="P45"><text:s text:c="2"/>tags?: string[]; // e.g., ["Computer Science", "Engineering"]</text:p>
      <text:p text:style-name="P46">}</text:p>
      <text:p text:style-name="Normal"><text:span text:style-name="T47">2. Target Folder Structure</text:span></text:p>
      <text:p text:style-name="P48">Please organize all generated code into this structure:</text:p>
      <text:p text:style-name="P49">Plaintext</text:p>
      <text:p text:style-name="P50">src/</text:p>
      <text:p text:style-name="Normal"><text:span text:style-name="T51">├</text:span><text:span text:style-name="T52">──</text:span><text:span text:style-name="T53"><text:s/>app/</text:span></text:p>
      <text:p text:style-name="Normal"><text:span text:style-name="T54">│ <text:s text:c="2"/></text:span><text:span text:style-name="T55">├</text:span><text:span text:style-name="T56">──</text:span><text:span text:style-name="T57"><text:s/>layout.tsx <text:s text:c="8"/># Global layout (Navbar, Footer, standard UAPB branding)</text:span></text:p>
      <text:p text:style-name="Normal"><text:span text:style-name="T58">│ <text:s text:c="2"/></text:span><text:span text:style-name="T59">├</text:span><text:span text:style-name="T60">──</text:span><text:span text:style-name="T61"><text:s/>page.tsx <text:s text:c="10"/># Main dashboard rendering the search and list</text:span></text:p>
      <text:p text:style-name="P62">│ <text:s text:c="2"/>└── globals.css <text:s text:c="7"/># Tailwind directives</text:p>
      <text:p text:style-name="Normal"><text:span text:style-name="T63">├</text:span><text:span text:style-name="T64">──</text:span><text:span text:style-name="T65"><text:s/>components/</text:span></text:p>
      <text:p text:style-name="Normal"><text:span text:style-name="T66">│ <text:s text:c="2"/></text:span><text:span text:style-name="T67">├</text:span><text:span text:style-name="T68">──</text:span><text:span text:style-name="T69"><text:s/>OpportunityCard.tsx # Displays individual program data</text:span></text:p>
      <text:p text:style-name="Normal"><text:span text:style-name="T70">│ <text:s text:c="2"/></text:span><text:span text:style-name="T71">├</text:span><text:span text:style-name="T72">──</text:span><text:span text:style-name="T73"><text:s/>SearchAndFilter.tsx # Input field and category toggles</text:span></text:p>
      <text:p text:style-name="Normal"><text:span text:style-name="T74">│ <text:s text:c="2"/></text:span><text:span text:style-name="T75">├</text:span><text:span text:style-name="T76">──</text:span><text:span text:style-name="T77"><text:s/>CountdownBadge.tsx <text:s/># Calculates "Days Left" based on deadline</text:span></text:p>
      <text:p text:style-name="P78">│ <text:s text:c="2"/>└── EmptyState.tsx <text:s text:c="5"/># Shown when search yields no results</text:p>
      <text:p text:style-name="Normal"><text:span text:style-name="T79">├</text:span><text:span text:style-name="T80">──</text:span><text:span text:style-name="T81"><text:s/>data/</text:span></text:p>
      <text:p text:style-name="P82">│ <text:s text:c="2"/>└── opportunities.json <text:s/># Array of mock Opportunity objects</text:p>
      <text:p text:style-name="Normal"><text:span text:style-name="T83">├</text:span><text:span text:style-name="T84">──</text:span><text:span text:style-name="T85"><text:s/>lib/</text:span></text:p>
      <text:p text:style-name="P86">│ <text:s text:c="2"/>└── utils.ts <text:s text:c="11"/># Helper functions (e.g., date formatting, date math)</text:p>
      <text:p text:style-name="P87">└── types/</text:p>
      <text:p text:style-name="P88"><text:s text:c="4"/>└── index.ts <text:s text:c="11"/># Interfaces defined above</text:p>
      <text:p text:style-name="Normal"><text:span text:style-name="T89">3. Core Features &amp; Implementation Rules</text:span></text:p>
      <text:soft-page-break/>
      <text:p text:style-name="P90">When generating code for these features, strictly adhere to the following rules:</text:p>
      <text:list text:style-name="LFO2" text:continue-numbering="true">
        <text:list-item>
          <text:p text:style-name="P91"><text:span text:style-name="T92">The Main Page (app/page.tsx):</text:span><text:span text:style-name="T93"><text:s/>This should act as the "smart" container. It will import the JSON data, manage the state for the search query (using React useState), filter the array of opportunities based on the search query, and pass the filtered data down to the components.</text:span></text:p>
        </text:list-item>
        <text:list-item>
          <text:p text:style-name="P94"><text:span text:style-name="T95">The Opportunity Card (components/OpportunityCard.tsx):</text:span><text:span text:style-name="T96"><text:s/>Must be a clean, accessible card layout using Tailwind. It should display the title, institution, summary, and a prominent "Apply Now" button linking to the applicationUrl.</text:span></text:p>
        </text:list-item>
        <text:list-item>
          <text:p text:style-name="P97"><text:span text:style-name="T98">Deadline Logic (components/CountdownBadge.tsx):</text:span><text:span text:style-name="T99"><text:s/>Write a utility function that compares the deadline string to the current system date.</text:span></text:p>
          <text:list text:continue-numbering="true">
            <text:list-item>
              <text:p text:style-name="P100">If the deadline is in the future, display "X Days Left" (use a green/warning color scheme via Tailwind).</text:p>
            </text:list-item>
            <text:list-item>
              <text:p text:style-name="P101">If the deadline has passed, the card should visually indicate it is closed (e.g., grayed out, or the button disabled), or it should be filtered out entirely.</text:p>
            </text:list-item>
          </text:list>
        </text:list-item>
        <text:list-item>
          <text:p text:style-name="P102"><text:span text:style-name="T103">Search Functionality:</text:span><text:span text:style-name="T104"><text:s/>The search bar should filter the JSON data by checking if the user's input string exists in the title, institution, or tags fields (case-insensitive).</text:span></text:p>
        </text:list-item>
        <text:list-item>
          <text:p text:style-name="P105"><text:span text:style-name="T106">Styling:</text:span><text:span text:style-name="T107"><text:s/>Do not write custom CSS. Use Tailwind utility classes exclusively. Ensure standard hover states and focus rings for accessibility.</text:span></text:p>
        </text:list-item>
      </text:list>
      <text:p text:style-name="Normal"><text:span text:style-name="T108">4. First Task</text:span></text:p>
      <text:p text:style-name="P109">To begin, please generate the contents of src/types/index.ts and a robust mock dataset for src/data/opportunities.json containing at least 3 distinct summer research programs so we have data to build the UI against.</text:p>
      <text:p text:style-name="P110"/>
      <text:p text:style-name="P111">COLOUR SCHEME</text:p>
      <text:p text:style-name="Normal"><text:span text:style-name="T112">*</text:span><text:span text:style-name="T113">Use image for reference and text below as specifics</text:span></text:p>
      <text:p text:style-name="P114">Gold<text:s/>Color:<text:s/>#efa522<text:s/>// This is exact color for anything that will be gold</text:p>
      <text:p text:style-name="P115">Black: text will be black when the background is White</text:p>
      <text:p text:style-name="P116">White: the main background will be white<text:s/></text:p>
      <text:p text:style-name="P117">Area for a UAPB image should be preserved<text:s/></text:p>
      <text:p text:style-name="P118">As shown in the image, the UAPB logo should have a similar “flag like” structure dangling from the top just like in the image.</text:p>
      <text:p text:style-name="P119"/>
      <text:p text:style-name="Normal"><text:span text:style-name="T120"><draw:frame draw:style-name="a0" draw:name="Picture 1" text:anchor-type="as-char" svg:x="0in" svg:y="0in" svg:width="6.5in" svg:height="3.31667in" style:rel-width="scale" style:rel-height="scale"><draw:image xlink:href="media/image1.png" xlink:type="simple" xlink:show="embed" xlink:actuate="onLoad"/><svg:title/><svg:desc/></draw:frame></text:span></text:p>
      <text:p text:style-name="P121"/>
      <text:p text:style-name="Normal"><text:span text:style-name="T122">The page should be consistent with what is on our existing page on the main website, therefore consider the style choices we have describ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gel Yuzya</meta:initial-creator>
    <dc:creator>Angel Yuzya</dc:creator>
    <meta:creation-date>2026-04-01T06:59:00Z</meta:creation-date>
    <dc:date>2026-04-01T18:24:00Z</dc:date>
    <meta:template xlink:href="Normal" xlink:type="simple"/>
    <meta:editing-cycles>2</meta:editing-cycles>
    <meta:editing-duration>PT41040S</meta:editing-duration>
    <meta:user-defined meta:name="MSIP_Label_da8f5f46-a041-4281-8d28-60e5f3a66ae0_Enabled">true</meta:user-defined>
    <meta:user-defined meta:name="MSIP_Label_da8f5f46-a041-4281-8d28-60e5f3a66ae0_SetDate">2026-04-01T07:00:36Z</meta:user-defined>
    <meta:user-defined meta:name="MSIP_Label_da8f5f46-a041-4281-8d28-60e5f3a66ae0_Method">Standard</meta:user-defined>
    <meta:user-defined meta:name="MSIP_Label_da8f5f46-a041-4281-8d28-60e5f3a66ae0_Name">Non-Sensitive Label</meta:user-defined>
    <meta:user-defined meta:name="MSIP_Label_da8f5f46-a041-4281-8d28-60e5f3a66ae0_SiteId">48a10848-c740-4d38-8280-7c1d0af20242</meta:user-defined>
    <meta:user-defined meta:name="MSIP_Label_da8f5f46-a041-4281-8d28-60e5f3a66ae0_ActionId">8d70540d-4214-4ddc-9480-5455476f048d</meta:user-defined>
    <meta:user-defined meta:name="MSIP_Label_da8f5f46-a041-4281-8d28-60e5f3a66ae0_ContentBits">0</meta:user-defined>
    <meta:user-defined meta:name="MSIP_Label_da8f5f46-a041-4281-8d28-60e5f3a66ae0_Tag">10, 3, 0, 1</meta:user-defined>
    <meta:document-statistic meta:page-count="4" meta:paragraph-count="8" meta:word-count="671" meta:character-count="4494" meta:row-count="31" meta:non-whitespace-character-count="3831"/>
  </office:meta>
</office:document-meta>
</file>